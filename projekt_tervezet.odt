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1370000004A9E84D613.png" manifest:media-type="image/png"/>
  <manifest:file-entry manifest:full-path="Pictures/100000010000017B0000003DA37AC170.png" manifest:media-type="image/png"/>
  <manifest:file-entry manifest:full-path="Pictures/100000010000013200000046F222A23D.png" manifest:media-type="image/png"/>
  <manifest:file-entry manifest:full-path="Pictures/10000001000000D30000007E74C5ABE6.png" manifest:media-type="image/png"/>
  <manifest:file-entry manifest:full-path="Pictures/10000001000002CF0000005276E77741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IX" svg:font-family="STIX" style:font-pitch="variable"/>
  </office:font-face-decls>
  <office:automatic-styles>
    <style:style style:name="Table1" style:family="table">
      <style:table-properties style:width="3.6285in" fo:margin-left="0.0375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81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262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style:font-name="STIX" fo:font-size="15pt" fo:font-weight="bold" officeooo:rsid="000dee4e" officeooo:paragraph-rsid="000dee4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STIX" fo:font-weight="bold" officeooo:rsid="000dee4e" officeooo:paragraph-rsid="000dee4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STIX" fo:font-weight="normal" officeooo:rsid="000dee4e" officeooo:paragraph-rsid="000dee4e" style:font-weight-asian="normal" style:font-weight-complex="normal"/>
    </style:style>
    <style:style style:name="P4" style:family="paragraph" style:parent-style-name="Heading_20_1">
      <style:paragraph-properties fo:text-align="justify" style:justify-single-word="false"/>
      <style:text-properties style:font-name="STIX" fo:font-size="15pt" fo:font-weight="bold" officeooo:rsid="000dee4e" officeooo:paragraph-rsid="000dee4e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STIX" fo:font-size="12pt" fo:font-weight="bold" officeooo:rsid="000dee4e" officeooo:paragraph-rsid="000dee4e" style:font-size-asian="10.5pt" style:font-weight-asian="bold" style:font-size-complex="12pt" style:font-weight-complex="bold"/>
    </style:style>
    <style:style style:name="P6" style:family="paragraph" style:parent-style-name="Heading_20_2">
      <style:paragraph-properties fo:text-align="justify" style:justify-single-word="false"/>
      <style:text-properties style:font-name="STIX" fo:font-size="15pt" fo:font-weight="normal" officeooo:rsid="000dee4e" officeooo:paragraph-rsid="000dee4e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STIX" fo:font-size="12pt" officeooo:rsid="000dee4e" style:font-size-asian="12pt" style:font-size-complex="12pt"/>
    </style:style>
    <style:style style:name="P8" style:family="paragraph" style:parent-style-name="Heading_20_2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STIX" fo:font-size="12pt" fo:font-weight="normal" officeooo:rsid="000ec295" officeooo:paragraph-rsid="000ec29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STIX" fo:font-size="12pt" fo:font-weight="normal" officeooo:rsid="000dee4e" officeooo:paragraph-rsid="000dee4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STIX" fo:font-size="12pt" fo:font-weight="normal" officeooo:rsid="000f8057" officeooo:paragraph-rsid="000f805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STIX" fo:font-size="12pt" fo:font-weight="normal" officeooo:rsid="000f8057" officeooo:paragraph-rsid="000f805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STIX" fo:font-size="12pt" fo:font-style="normal" fo:font-weight="normal" officeooo:rsid="000f8057" officeooo:paragraph-rsid="000f805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STIX" fo:font-size="12pt" fo:font-style="italic" fo:font-weight="normal" officeooo:rsid="000f8057" officeooo:paragraph-rsid="000f8057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STIX" fo:font-size="12pt" fo:font-weight="normal" officeooo:rsid="00100945" officeooo:paragraph-rsid="0010094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STIX" fo:font-size="12pt" fo:font-style="italic" fo:font-weight="normal" officeooo:rsid="00100945" officeooo:paragraph-rsid="00100945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STIX" fo:font-size="12pt" fo:font-weight="normal" officeooo:rsid="00113c85" officeooo:paragraph-rsid="00113c8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STIX" fo:font-size="12pt" fo:font-weight="normal" officeooo:rsid="00113c85" officeooo:paragraph-rsid="0013379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STIX" fo:font-size="12pt" fo:font-weight="normal" officeooo:rsid="00133796" officeooo:paragraph-rsid="0013379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STIX" fo:font-size="12pt" fo:font-weight="normal" officeooo:rsid="0014f400" officeooo:paragraph-rsid="0014f40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STIX" fo:font-size="12pt" fo:font-style="italic" fo:font-weight="normal" officeooo:rsid="0014f400" officeooo:paragraph-rsid="0014f400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STIX" fo:font-size="12pt" fo:font-weight="normal" officeooo:rsid="001611b1" officeooo:paragraph-rsid="001611b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STIX" fo:font-size="12pt" fo:font-weight="normal" officeooo:rsid="001e2d8c" officeooo:paragraph-rsid="001e2d8c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STIX" fo:font-size="12pt" fo:font-weight="normal" officeooo:rsid="001e2d8c" officeooo:paragraph-rsid="001e2d8c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STIX" fo:font-size="12pt" fo:font-weight="normal" officeooo:rsid="001fefd6" officeooo:paragraph-rsid="001fefd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STIX" fo:font-size="12pt" fo:font-weight="normal" officeooo:rsid="001fefd6" officeooo:paragraph-rsid="001fefd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STIX" fo:font-size="12pt" fo:font-weight="normal" officeooo:rsid="0014f400" officeooo:paragraph-rsid="001611b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STIX" fo:font-size="12pt" fo:font-weight="normal" officeooo:rsid="001611b1" officeooo:paragraph-rsid="001fefd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STIX" fo:font-size="12pt" fo:font-style="italic" fo:font-weight="normal" officeooo:rsid="001611b1" officeooo:paragraph-rsid="001611b1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STIX" fo:font-size="12pt" fo:font-style="normal" fo:font-weight="normal" officeooo:rsid="0017cf42" officeooo:paragraph-rsid="0017cf4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STIX" fo:font-size="12pt" officeooo:rsid="0017cf42" officeooo:paragraph-rsid="0017cf42" style:font-size-asian="10.5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STIX" fo:font-size="12pt" officeooo:rsid="001862e0" officeooo:paragraph-rsid="001862e0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STIX" fo:font-size="12pt" style:font-size-asian="10.5pt" style:font-size-complex="12pt"/>
    </style:style>
    <style:style style:name="T1" style:family="text">
      <style:text-properties officeooo:rsid="0014f400"/>
    </style:style>
    <style:style style:name="T2" style:family="text">
      <style:text-properties officeooo:rsid="00100945"/>
    </style:style>
    <style:style style:name="T3" style:family="text">
      <style:text-properties officeooo:rsid="00133796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sub 58%"/>
    </style:style>
    <style:style style:name="T7" style:family="text">
      <style:text-properties style:text-position="0% 100%" officeooo:rsid="00133796"/>
    </style:style>
    <style:style style:name="T8" style:family="text">
      <style:text-properties officeooo:rsid="001d526f"/>
    </style:style>
    <style:style style:name="T9" style:family="text">
      <style:text-properties officeooo:rsid="001e2d8c"/>
    </style:style>
    <style:style style:name="T10" style:family="text">
      <style:text-properties officeooo:rsid="001fefd6"/>
    </style:style>
    <style:style style:name="T11" style:family="text">
      <style:text-properties officeooo:rsid="0020f3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ari képfeldolgozás projektmunka</text:p>
      <text:p text:style-name="P2"/>
      <text:p text:style-name="P3">I. Mérföldkő</text:p>
      <text:p text:style-name="P3">Készítette: Takács Ábel</text:p>
      <text:h text:style-name="P4" text:outline-level="1">Járműmozgás-elemző Rendszer – Algoritmus- és Költségterv</text:h>
      <text:p text:style-name="P5"/>
      <text:h text:style-name="P6" text:outline-level="2">1. Projektáttekintés</text:h>
      <text:p text:style-name="P7">A rendszer célja videófelvételeken közlekedő járművek automatikus detektálása, mozgási útvonaluk rekonstruálása, a forgalmi trendek meghatározása, valamint a trendektől eltérő (anomális) mozgásminták azonosítása. A megvalósítás Python nyelven, OpenCV könyvtár felhasználásával történik.</text:p>
      <text:h text:style-name="P8" text:outline-level="2">2. Algoritmus terv</text:h>
      <text:p text:style-name="P9"><draw:frame draw:style-name="fr1" draw:name="Image1" text:anchor-type="char" svg:x="0in" svg:y="0.2602in" svg:width="6.6929in" svg:height="0.7634in" draw:z-index="0"><draw:image xlink:href="Pictures/10000001000002CF0000005276E77741.png" xlink:type="simple" xlink:show="embed" xlink:actuate="onLoad" draw:mime-type="image/png"/></draw:frame>2.1 A feldolgozás folyamata</text:p>
      <text:p text:style-name="P10">[2.1] - A feldolgozás menetét szemléltető pipeline</text:p>
      <text:p text:style-name="P10"/>
      <text:p text:style-name="P11">2.2 Előfeldolgozás</text:p>
      <text:p text:style-name="P11"/>
      <text:p text:style-name="P11">Cél: A nyers videóképkockák zajszűrése és normalizálása a detektálás pontosságának javítása érdekében.</text:p>
      <text:p text:style-name="P11"/>
      <text:p text:style-name="P11">Lépések:</text:p>
      <text:list text:style-name="L1">
        <text:list-item>
          <text:p text:style-name="P12">Képkocka beolvasása (cv2.VideoCapture)</text:p>
        </text:list-item>
        <text:list-item>
          <text:p text:style-name="P12">Szürkeárnylatos konverzió (cv2.cvtColor)</text:p>
        </text:list-item>
        <text:list-item>
          <text:p text:style-name="P12">Gauss-simítás a zajszűrés eléréséhez (cv2.GaussianBlur)</text:p>
        </text:list-item>
      </text:list>
      <text:p text:style-name="P11"/>
      <text:p text:style-name="P13">Pszeudokód:</text:p>
      <text:p text:style-name="P14">FOR every frame f_t <text:span text:style-name="T1">IN</text:span> video:</text:p>
      <text:p text:style-name="P14"><text:tab/>gray_t = cvtColor(f_t, BGR2GRAY)</text:p>
      <text:p text:style-name="P14"><text:tab/>smooth_t = GaussianBlur(gray_t, kernel=(5, 5), o=1.5) // Finomhangolható</text:p>
      <text:p text:style-name="P14">END FOR</text:p>
      <text:p text:style-name="P11"/>
      <text:p text:style-name="P11">2.3 Járműdetektálás</text:p>
      <text:p text:style-name="P11"/>
      <text:p text:style-name="P11">Módszer: <text:span text:style-name="T2">MOG2 (Mixture of Gaussian v2) háttérszubsztrakció, mely adaptívan képes modellezni a hátteret. Ezzel elkészíthető egy modell a háttérre, amennyiben egy pixel/kernel-átlag szignifikáns eltérést mutat a modelltől potenciális járműnek tekinthető.</text:span></text:p>
      <text:p text:style-name="P11"/>
      <text:p text:style-name="P15">Peszudokód:</text:p>
      <text:p text:style-name="P16"><text:soft-page-break/>FOR every smooth_t:</text:p>
      <text:p text:style-name="P16"><text:tab/>mask_t = mog2.apply(smooth_t)</text:p>
      <text:p text:style-name="P16"><text:tab/>mask_t = morphologyEx(mask_t, MORPH_CLOSE, kernel) // Lyukak tömítése</text:p>
      <text:p text:style-name="P16"><text:tab/>mask_t = morphologyEx(mask_t, MORPH_OPEN, kernel) // Zajszűrés</text:p>
      <text:p text:style-name="P16"><text:tab/>contours = findContours(mask_t) // Körvonalak detektálása</text:p>
      <text:p text:style-name="P16"><text:tab/></text:p>
      <text:p text:style-name="P16"><text:tab/>FOR every c <text:span text:style-name="T1">IN</text:span> contours:</text:p>
      <text:p text:style-name="P16"><text:tab/><text:tab/>IF area(c) &gt; MIN_AREA: // Miniális jármű területe a képen</text:p>
      <text:p text:style-name="P16"><text:tab/><text:tab/><text:tab/>bbox = boundingRect(c) // A körvonal négyszöggé alakítása</text:p>
      <text:p text:style-name="P16"><text:tab/><text:tab/><text:tab/>detections_t.append(bbox)</text:p>
      <text:p text:style-name="P16"><text:tab/>END FOR</text:p>
      <text:p text:style-name="P16">END FOR</text:p>
      <text:p text:style-name="P15"/>
      <text:p text:style-name="P15">2.4 Járműkövetés</text:p>
      <text:p text:style-name="P15"/>
      <text:p text:style-name="P17">Cél: Azonos jármű detektálása egymást követő képkockákon és pályájának folyamatos nyomonkövetése.</text:p>
      <text:p text:style-name="P17"/>
      <text:p text:style-name="P17">2.4.1 Kalman-szűrő - <text:span text:style-name="T3">Követés</text:span></text:p>
      <text:p text:style-name="P17">Minden detektált járműhöz fenntartunk egy Kalman-szűrőt, melynek állapotvektora:</text:p>
      <text:p text:style-name="P17">x = [u, v, u’, v’]<text:span text:style-name="T4">T</text:span></text:p>
      <text:p text:style-name="P17">ahol (u, v) a bbox középpontja, (u’, v’) pedig a sebességkomponensek.</text:p>
      <text:p text:style-name="P17">Predikció (állapotátmenet):</text:p>
      <text:p text:style-name="P17"><text:span text:style-name="T5">x</text:span><text:span text:style-name="T6">t|t-1</text:span><text:span text:style-name="T5"> = Fx</text:span><text:span text:style-name="T6">t-1|t-1</text:span></text:p>
      <text:p text:style-name="P17"><draw:frame draw:style-name="fr1" draw:name="Image2" text:anchor-type="char" svg:x="2.248in" svg:y="0.0264in" svg:width="2.198in" svg:height="1.3126in" draw:z-index="1"><draw:image xlink:href="Pictures/10000001000000D30000007E74C5ABE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Frissítés:</text:p>
      <text:p text:style-name="P18"><text:span text:style-name="T7">Kalman erősítés számítása: </text:span>K<text:span text:style-name="T6">t</text:span> = P<text:span text:style-name="T6">t|t-1</text:span>H<text:span text:style-name="T4">T</text:span>(HP<text:span text:style-name="T6">t|t-1</text:span>H<text:span text:style-name="T4">T</text:span>+R)<text:span text:style-name="T4">-1 </text:span></text:p>
      <text:p text:style-name="P18">ahol <text:span text:style-name="T3">H a megfigyelési mátrix,</text:span> P <text:span text:style-name="T3">a becsült kovariancia, R a mérési zaj.</text:span></text:p>
      <text:p text:style-name="P17"><text:span text:style-name="T3">Frissített állapot számítása: </text:span>x<text:span text:style-name="T6">t|t</text:span> = x<text:span text:style-name="T6">t|t-1</text:span> + K<text:span text:style-name="T6">t</text:span>(z<text:span text:style-name="T6">t</text:span> – Hx<text:span text:style-name="T6">t|t-1</text:span>)</text:p>
      <text:p text:style-name="P19">ahol (z<text:span text:style-name="T6">t</text:span> – Hx<text:span text:style-name="T6">t|t-1</text:span>) az innovációs vektor (a mérés és a becslés eltérése), z<text:span text:style-name="T6">t </text:span><text:span text:style-name="T5">az állapotbecslés.</text:span></text:p>
      <text:p text:style-name="P19"/>
      <text:p text:style-name="P19">2.4.2 Magyar algoritmus – Hozzárendelés</text:p>
      <text:p text:style-name="P19">A detektált boxok és az aktív követések összerendelése IoU (Intersection over Union) alapú költségmátrix segítségével:</text:p>
      <text:p text:style-name="P19">IoU(A, B) = <draw:frame draw:style-name="fr2" draw:name="Object1" text:anchor-type="as-char" svg:y="-0.2457in" svg:width="0.478in" svg:height="0.398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>Pszeudokód:</text:p>
      <text:p text:style-name="P21">predicted_pos = [kalman-predict() FOR k IN active_trackers]</text:p>
      <text:p text:style-name="P21">cost_m = 1 – IoU_matrix(predicted_pos, detections_t)</text:p>
      <text:p text:style-name="P21">row_ind, col_ind = hungarian_alg(cost_m)</text:p>
      <text:p text:style-name="P21"/>
      <text:p text:style-name="P21"><text:soft-page-break/>FOR every (i, j) párosításban:</text:p>
      <text:p text:style-name="P21"><text:tab/>IF cost_m[i][j] &lt; THRESHOLD:</text:p>
      <text:p text:style-name="P21"><text:tab/><text:tab/>active_trackers[i].<text:span text:style-name="T8">kalman_</text:span>update(detections_t[j])</text:p>
      <text:p text:style-name="P21"><text:tab/>ELSE:</text:p>
      <text:p text:style-name="P21"><text:tab/><text:tab/>új tracker létrehozása detections_t[j]-hez</text:p>
      <text:p text:style-name="P21">END FOR</text:p>
      <text:p text:style-name="P21">eltűnt tracker-ek törlése (min N képkockán át nem detektált)</text:p>
      <text:p text:style-name="P20"/>
      <text:p text:style-name="P20">2.5 Útvonal rekonstrukció:</text:p>
      <text:p text:style-name="P20"/>
      <text:p text:style-name="P20">Minden jármű útvonala a detektált középpontok időrendezett sora. Ezt az útvonalat finomhangolási lépésként lehet simítani.</text:p>
      <text:p text:style-name="P20"/>
      <text:p text:style-name="P20">2.6 Trendanalízis:</text:p>
      <text:p text:style-name="P20"/>
      <text:p text:style-name="P20">Cél: A jellemző mozgásminták (útvonalak, sebességek, irányok) meghatározása a teljes felvételen.</text:p>
      <text:p text:style-name="P20">Módszer: <text:span text:style-name="T9">Az útvonalak reprezentációja, majd </text:span>K-means klaszterezés.</text:p>
      <text:p text:style-name="P20"/>
      <text:p text:style-name="P22">A detektált útvonalakat egységes hosszúságú <text:span text:style-name="T9">F</text:span>eature <text:span text:style-name="T9">V</text:span>ektorokká alakítjuk, majd ezeket a vektorokat klaszterezzük. <text:span text:style-name="T9">Mivel nem biztosított, hogy aaz összes detektált jármű ugyanannyi képkockán látszódik, így ez egy szükséges egységesítési lépés.</text:span></text:p>
      <text:p text:style-name="P23">Lineáris interpolációval minden útvonalat N egyenlő közű pontra mintavételezünk (N=20 egy tipikus választás), ezzel megkapjuk a Feature Vektort. A kapott vektor normalizálással finomhangolható.</text:p>
      <text:p text:style-name="P22">A klaszterek számát a könyök-módszerrel meghatározhatjuk, vagyis az összesített négyzetes eltérés görbéjének töréspontja alapján. <text:span text:style-name="T9">A cél, hogy az azonos csoportokba kerülő útvonalak minél hasonlóbbak legyenek egymáshoz.</text:span></text:p>
      <text:p text:style-name="P22"/>
      <text:p text:style-name="P22"><draw:frame draw:style-name="fr3" draw:name="Image3" text:anchor-type="char" svg:width="3.1866in" svg:height="0.7283in" draw:z-index="3"><draw:image xlink:href="Pictures/100000010000013200000046F222A23D.png" xlink:type="simple" xlink:show="embed" xlink:actuate="onLoad" draw:mime-type="image/png"/></draw:frame></text:p>
      <text:p text:style-name="P23">Ahol Cj a j-edik klaszter centroidja (az összes klaszterbe tartozó útvonal átlaga), Sj a klaszterbe tartozó útvonalak halmaza, <text:span text:style-name="T10">f</text:span>k pedig az elemzett útvonal Feature Vektora.</text:p>
      <text:p text:style-name="P23">Az algoritmus lépései:</text:p>
      <text:list text:style-name="L2">
        <text:list-item>
          <text:p text:style-name="P24">Kiválasztunk K centroidot véletlenszerűen</text:p>
        </text:list-item>
        <text:list-item>
          <text:p text:style-name="P24">Minden útvonalat a legközelebbi centroidhoz rendelünk</text:p>
        </text:list-item>
        <text:list-item>
          <text:p text:style-name="P24">A centroidokat újraszámítjuk a hozzájuk rendelt útvonallal</text:p>
        </text:list-item>
        <text:list-item>
          <text:p text:style-name="P25">Ha a centroidok nem változnak megállunk, amúgy 2-es lépéstől folytatjuk amíg nem konvergál az érték</text:p>
        </text:list-item>
      </text:list>
      <text:p text:style-name="P26"/>
      <text:p text:style-name="P26">Az optimális K meghatározása (könyök módszer):</text:p>
      <text:p text:style-name="P26">Mivel nem tudhatjuk hány tipikus útvonal létezik, így futtatjuk a K-means algoritmust K=1, 2, … Kmax értékekre és ábrázoljuk a WCSS értékeket. Az optimális K érték ott van, ahol d<text:span text:style-name="T4">2</text:span>WCSS maximális.</text:p>
      <text:p text:style-name="P27"/>
      <text:p text:style-name="P22">2.7 Anomáliadetektálás</text:p>
      <text:p text:style-name="P22"><text:soft-page-break/>Cél: A meghatározott trendektől szignifikánsan eltérő mozgások beazonosítása.</text:p>
      <text:p text:style-name="P22">Módszer: Mahalanobis-távolság alapú küszöbölés.</text:p>
      <text:p text:style-name="P22">Egy Tk útvonal anomália-pontszáma a legközelebbi klaszterközéptől való eltérés Mahalanobis-távolságban számolva.</text:p>
      <text:p text:style-name="P22"/>
      <text:p text:style-name="P22"><draw:frame draw:style-name="fr3" draw:name="Image4" text:anchor-type="char" svg:width="3.9472in" svg:height="0.6346in" draw:z-index="4"><draw:image xlink:href="Pictures/100000010000017B0000003DA37AC170.png" xlink:type="simple" xlink:show="embed" xlink:actuate="onLoad" draw:mime-type="image/png"/></draw:frame></text:p>
      <text:p text:style-name="P26">Ahol <draw:frame draw:style-name="fr4" draw:name="Object2" text:anchor-type="as-char" svg:y="-0.1709in" svg:width="0.3492in" svg:height="0.2638in" draw:z-index="5"><draw:object xlink:href="./Object 2" xlink:type="simple" xlink:show="embed" xlink:actuate="onLoad"/><draw:image xlink:href="./ObjectReplacements/Object 2" xlink:type="simple" xlink:show="embed" xlink:actuate="onLoad"/></draw:frame><text:s/>a j-edik klaszter kovarianciamátrixa:</text:p>
      <text:p text:style-name="P26"/>
      <text:p text:style-name="P28"><draw:frame draw:style-name="fr3" draw:name="Image5" text:anchor-type="char" svg:width="3.239in" svg:height="0.7701in" draw:z-index="6"><draw:image xlink:href="Pictures/10000001000001370000004A9E84D613.png" xlink:type="simple" xlink:show="embed" xlink:actuate="onLoad" draw:mime-type="image/png"/></draw:frame></text:p>
      <text:p text:style-name="P22">A döntési szabály, hogy egy <text:span text:style-name="T11">f</text:span>k útvonal akkor minősül anomáliának, amennyiben a Mahalanobis-távolságának minimuma meghalad egy küszöbértéket. Ennek az értéknek a meghatározása leghatékonyabban a távolságok eloszlásának 95. percentilise alapján oldható meg.</text:p>
      <text:p text:style-name="P22"/>
      <text:p text:style-name="P22">Pszeudokód:</text:p>
      <text:p text:style-name="P29">FOR every T_k útvonal:</text:p>
      <text:p text:style-name="P29"><text:tab/>dist = [Mahalanobis(T_k, c_j, sum_j) FOR j IN clusters]</text:p>
      <text:p text:style-name="P29"><text:tab/>min_dist = min(dist)</text:p>
      <text:p text:style-name="P29"><text:tab/>IF min_dist &gt; THETA: // Az eltérés küszöbértéke</text:p>
      <text:p text:style-name="P29"><text:tab/><text:tab/>T_k megjelölése anomáliaként</text:p>
      <text:p text:style-name="P29"><text:tab/><text:tab/>naplózás (timestamp, pozíció, eltérés mértéke)</text:p>
      <text:p text:style-name="P29">END FOR</text:p>
      <text:p text:style-name="P29"/>
      <text:p text:style-name="P30">3 Költségterv:</text:p>
      <text:p text:style-name="P30"/>
      <text:p text:style-name="P30">3.1 Fejlesztési idő:</text:p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Folyamat</text:p>
          </table:table-cell>
          <table:table-cell table:style-name="Table1.B1" office:value-type="string">
            <text:p text:style-name="P31">Időigény</text:p>
          </table:table-cell>
        </table:table-row>
        <table:table-row>
          <table:table-cell table:style-name="Table1.A2" office:value-type="string">
            <text:p text:style-name="P31">Környezet beállítása és adatbeszerzés</text:p>
          </table:table-cell>
          <table:table-cell table:style-name="Table1.B2" office:value-type="string">
            <text:p text:style-name="P31">4 óra</text:p>
          </table:table-cell>
        </table:table-row>
        <table:table-row>
          <table:table-cell table:style-name="Table1.A2" office:value-type="string">
            <text:p text:style-name="P31">Előfeldolgozás és detektálás</text:p>
          </table:table-cell>
          <table:table-cell table:style-name="Table1.B2" office:value-type="string">
            <text:p text:style-name="P31">16 óra</text:p>
          </table:table-cell>
        </table:table-row>
        <table:table-row>
          <table:table-cell table:style-name="Table1.A2" office:value-type="string">
            <text:p text:style-name="P31">Kalman-szűrő + követési modul</text:p>
          </table:table-cell>
          <table:table-cell table:style-name="Table1.B2" office:value-type="string">
            <text:p text:style-name="P31">16 óra</text:p>
          </table:table-cell>
        </table:table-row>
        <table:table-row>
          <table:table-cell table:style-name="Table1.A2" office:value-type="string">
            <text:p text:style-name="P31">Útvonalrekonstrukció</text:p>
          </table:table-cell>
          <table:table-cell table:style-name="Table1.B2" office:value-type="string">
            <text:p text:style-name="P31">8 óra</text:p>
          </table:table-cell>
        </table:table-row>
        <table:table-row>
          <table:table-cell table:style-name="Table1.A2" office:value-type="string">
            <text:p text:style-name="P31">Trendanalízis (klaszterezés)</text:p>
          </table:table-cell>
          <table:table-cell table:style-name="Table1.B2" office:value-type="string">
            <text:p text:style-name="P31">10 óra</text:p>
          </table:table-cell>
        </table:table-row>
        <table:table-row>
          <table:table-cell table:style-name="Table1.A2" office:value-type="string">
            <text:p text:style-name="P31">Anomália detekció</text:p>
          </table:table-cell>
          <table:table-cell table:style-name="Table1.B2" office:value-type="string">
            <text:p text:style-name="P31">10 óra</text:p>
          </table:table-cell>
        </table:table-row>
        <table:table-row>
          <table:table-cell table:style-name="Table1.A2" office:value-type="string">
            <text:p text:style-name="P31">Vizualizáció</text:p>
          </table:table-cell>
          <table:table-cell table:style-name="Table1.B2" office:value-type="string">
            <text:p text:style-name="P31">8 óra</text:p>
          </table:table-cell>
        </table:table-row>
        <table:table-row table:style-name="Table1.9">
          <table:table-cell table:style-name="Table1.A2" office:value-type="string">
            <text:p text:style-name="P31">Tesztelés és finomhangolás</text:p>
          </table:table-cell>
          <table:table-cell table:style-name="Table1.B2" office:value-type="string">
            <text:p text:style-name="P31">16 óra</text:p>
          </table:table-cell>
        </table:table-row>
        <table:table-row table:style-name="Table1.9">
          <table:table-cell table:style-name="Table1.A2" office:value-type="string">
            <text:p text:style-name="P31">Összesen</text:p>
          </table:table-cell>
          <table:table-cell table:style-name="Table1.B2" office:value-type="string">
            <text:p text:style-name="P31">~88 óra</text:p>
          </table:table-cell>
        </table:table-row>
      </table:table>
      <text:p text:style-name="P30"><text:soft-page-break/>3.2 Hardverköltségek</text:p>
      <text:p text:style-name="P3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2">Eszköz</text:p>
          </table:table-cell>
          <table:table-cell table:style-name="Table2.A1" office:value-type="string">
            <text:p text:style-name="P32">Megjegyzés</text:p>
          </table:table-cell>
          <table:table-cell table:style-name="Table2.C1" office:value-type="string">
            <text:p text:style-name="P32">Becsült ár</text:p>
          </table:table-cell>
        </table:table-row>
        <table:table-row>
          <table:table-cell table:style-name="Table2.A2" office:value-type="string">
            <text:p text:style-name="P31">IP kamera</text:p>
          </table:table-cell>
          <table:table-cell table:style-name="Table2.A2" office:value-type="string">
            <text:p text:style-name="P31">4MP, Color, FullHD, 30fps, éjjellátó</text:p>
          </table:table-cell>
          <table:table-cell table:style-name="Table2.C2" office:value-type="string">
            <text:p text:style-name="P31">50.000 Ft</text:p>
          </table:table-cell>
        </table:table-row>
        <table:table-row>
          <table:table-cell table:style-name="Table2.A2" office:value-type="string">
            <text:p text:style-name="P32">PoE switch</text:p>
          </table:table-cell>
          <table:table-cell table:style-name="Table2.A2" office:value-type="string">
            <text:p text:style-name="P32">Tápellátás hálózaton keresztül</text:p>
          </table:table-cell>
          <table:table-cell table:style-name="Table2.C2" office:value-type="string">
            <text:p text:style-name="P32">20.000 Ft</text:p>
          </table:table-cell>
        </table:table-row>
        <table:table-row>
          <table:table-cell table:style-name="Table2.A2" office:value-type="string">
            <text:p text:style-name="P32">Szerelési anyagok</text:p>
          </table:table-cell>
          <table:table-cell table:style-name="Table2.A2" office:value-type="string">
            <text:p text:style-name="P32">~30 méteres kiépítés</text:p>
          </table:table-cell>
          <table:table-cell table:style-name="Table2.C2" office:value-type="string">
            <text:p text:style-name="P32">10.000 Ft</text:p>
          </table:table-cell>
        </table:table-row>
        <table:table-row>
          <table:table-cell table:style-name="Table2.A2" office:value-type="string">
            <text:p text:style-name="P32">Szerverköltségek</text:p>
          </table:table-cell>
          <table:table-cell table:style-name="Table2.A2" office:value-type="string">
            <text:p text:style-name="P32">Folyamatos videofeldolgozáshoz CPU/GPU és tárhely igény</text:p>
          </table:table-cell>
          <table:table-cell table:style-name="Table2.C2" office:value-type="string">
            <text:p text:style-name="P32">450.000 Ft</text:p>
          </table:table-cell>
        </table:table-row>
        <table:table-row>
          <table:table-cell table:style-name="Table2.A2" office:value-type="string">
            <text:p text:style-name="P32">Alaplap+CPU</text:p>
          </table:table-cell>
          <table:table-cell table:style-name="Table2.A2" office:value-type="string">
            <text:p text:style-name="P32">16 mag, magas órajel</text:p>
          </table:table-cell>
          <table:table-cell table:style-name="Table2.C2" office:value-type="string">
            <text:p text:style-name="P32">60.000 Ft + 120.000 Ft</text:p>
          </table:table-cell>
        </table:table-row>
        <table:table-row>
          <table:table-cell table:style-name="Table2.A2" office:value-type="string">
            <text:p text:style-name="P32">RAM </text:p>
          </table:table-cell>
          <table:table-cell table:style-name="Table2.A2" office:value-type="string">
            <text:p text:style-name="P32">Min. 32 GB, videópuffer</text:p>
          </table:table-cell>
          <table:table-cell table:style-name="Table2.C2" office:value-type="string">
            <text:p text:style-name="P32">80.000 Ft</text:p>
          </table:table-cell>
        </table:table-row>
        <table:table-row>
          <table:table-cell table:style-name="Table2.A2" office:value-type="string">
            <text:p text:style-name="P32">GPU</text:p>
          </table:table-cell>
          <table:table-cell table:style-name="Table2.A2" office:value-type="string">
            <text:p text:style-name="P32">CUDA, OpenCV GPU támogatás</text:p>
          </table:table-cell>
          <table:table-cell table:style-name="Table2.C2" office:value-type="string">
            <text:p text:style-name="P32">130.000 Ft</text:p>
          </table:table-cell>
        </table:table-row>
        <table:table-row>
          <table:table-cell table:style-name="Table2.A2" office:value-type="string">
            <text:p text:style-name="P32">SSD</text:p>
          </table:table-cell>
          <table:table-cell table:style-name="Table2.A2" office:value-type="string">
            <text:p text:style-name="P32">Min. 500GB</text:p>
          </table:table-cell>
          <table:table-cell table:style-name="Table2.C2" office:value-type="string">
            <text:p text:style-name="P32">30.000 Ft</text:p>
          </table:table-cell>
        </table:table-row>
        <table:table-row>
          <table:table-cell table:style-name="Table2.A2" office:value-type="string">
            <text:p text:style-name="P32">Egyéb alkatrészek</text:p>
          </table:table-cell>
          <table:table-cell table:style-name="Table2.A2" office:value-type="string">
            <text:p text:style-name="P32">Táp, Ház stb.</text:p>
          </table:table-cell>
          <table:table-cell table:style-name="Table2.C2" office:value-type="string">
            <text:p text:style-name="P32">50.000 Ft</text:p>
          </table:table-cell>
        </table:table-row>
        <table:table-row>
          <table:table-cell table:style-name="Table2.A2" office:value-type="string">
            <text:p text:style-name="P32">NAS tárolóegység</text:p>
          </table:table-cell>
          <table:table-cell table:style-name="Table2.A2" office:value-type="string">
            <text:p text:style-name="P32">Biztonsági mentések, felvételek hosszútávú tárolása</text:p>
          </table:table-cell>
          <table:table-cell table:style-name="Table2.C2" office:value-type="string">
            <text:p text:style-name="P32">120.000 Ft</text:p>
          </table:table-cell>
        </table:table-row>
        <table:table-row>
          <table:table-cell table:style-name="Table2.A2" office:value-type="string">
            <text:p text:style-name="P32">Hálózati infrastruktúra</text:p>
          </table:table-cell>
          <table:table-cell table:style-name="Table2.A2" office:value-type="string">
            <text:p text:style-name="P32">Router, UPS</text:p>
          </table:table-cell>
          <table:table-cell table:style-name="Table2.C2" office:value-type="string">
            <text:p text:style-name="P32">50.000 Ft</text:p>
          </table:table-cell>
        </table:table-row>
        <table:table-row>
          <table:table-cell table:style-name="Table2.A2" office:value-type="string">
            <text:p text:style-name="P32">Összesen</text:p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P32">~720.000 Ft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IX" svg:font-family="STIX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9:52:15.860010585</meta:creation-date>
    <dc:date>2026-04-10T12:31:39.633222677</dc:date>
    <meta:editing-duration>PT1H24M16S</meta:editing-duration>
    <meta:editing-cycles>11</meta:editing-cycles>
    <meta:generator>LibreOffice/25.8.4.2$Linux_X86_64 LibreOffice_project/580$Build-2</meta:generator>
    <meta:document-statistic meta:table-count="2" meta:image-count="5" meta:object-count="2" meta:page-count="5" meta:paragraph-count="153" meta:word-count="805" meta:character-count="6241" meta:non-whitespace-character-count="5556"/>
  </office:meta>
</office:document-meta>
</file>

<file path=Object 1/content.xml><?xml version="1.0" encoding="utf-8"?>
<math xmlns="http://www.w3.org/1998/Math/MathML" display="block">
  <semantics>
    <mfrac>
      <mrow>
        <mo fence="true" form="prefix" stretchy="true">|</mo>
        <mrow>
          <mrow>
            <mi>A</mi>
            <mo stretchy="false">∩</mo>
            <mi>B</mi>
          </mrow>
        </mrow>
        <mo fence="true" form="postfix" stretchy="true">|</mo>
      </mrow>
      <mrow>
        <mo fence="true" form="prefix" stretchy="true">|</mo>
        <mrow>
          <mrow>
            <mi>A</mi>
            <mo stretchy="false">∪</mo>
            <mi>B</mi>
          </mrow>
        </mrow>
        <mo fence="true" form="postfix" stretchy="true">|</mo>
      </mrow>
    </mfrac>
    <annotation encoding="StarMath 5.0">abs {A intersection B} over abs { A union B }</annotation>
  </semantics>
</math>
</file>

<file path=Object 2/content.xml><?xml version="1.0" encoding="utf-8"?>
<math xmlns="http://www.w3.org/1998/Math/MathML" display="block">
  <semantics>
    <mrow>
      <msub>
        <mo stretchy="false">∑</mo>
        <mi>j</mi>
      </msub>
      <mrow/>
    </mrow>
    <annotation encoding="StarMath 5.0">sum sub j  </annotation>
  </semantics>
</math>
</file>